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700000073A58E3D3A.png" manifest:media-type="image/png"/>
  <manifest:file-entry manifest:full-path="Pictures/100000000000032900000219DBF021DC.png" manifest:media-type="image/png"/>
  <manifest:file-entry manifest:full-path="Pictures/1000000000000058000000753D3A60D3.png" manifest:media-type="image/png"/>
  <manifest:file-entry manifest:full-path="Pictures/10000000000000EB000000FEFC20D453.png" manifest:media-type="image/png"/>
  <manifest:file-entry manifest:full-path="Pictures/100000000000032C00000124A227D91C.png" manifest:media-type="image/png"/>
  <manifest:file-entry manifest:full-path="Pictures/10000000000000CB000000A6D3750587.png" manifest:media-type="image/png"/>
  <manifest:file-entry manifest:full-path="Pictures/1000000000000052000000D2EAADFEA9.png" manifest:media-type="image/png"/>
  <manifest:file-entry manifest:full-path="Pictures/10000000000000860000005570A1322A.png" manifest:media-type="image/png"/>
  <manifest:file-entry manifest:full-path="Pictures/10000000000001D500000183B4F2A3A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8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2">
        <table:table-column table:style-name="co2" table:number-columns-repeated="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  <table:table-cell>
            <draw:frame draw:z-index="0" draw:name="Obraz 1" draw:style-name="gr1" draw:text-style-name="P1" svg:width="13.028cm" svg:height="10.278cm" svg:x="2.242cm" svg:y="0cm">
              <draw:image xlink:href="Pictures/10000000000001D500000183B4F2A3A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TX</text:p>
          </table:table-cell>
          <table:table-cell office:value-type="string" calcext:value-type="string">
            <text:p>pin side</text:p>
          </table:table-cell>
          <table:table-cell table:number-columns-repeated="18"/>
        </table:table-row>
        <table:table-row table:style-name="ro1">
          <table:table-cell table:style-name="ce1" table:number-columns-repeated="5"/>
          <table:table-cell table:style-name="ce16"/>
          <table:table-cell table:style-name="ce17"/>
          <table:table-cell table:style-name="ce1" table:number-columns-repeated="5"/>
          <table:table-cell table:number-columns-repeated="8"/>
        </table:table-row>
        <table:table-row table:style-name="ro1">
          <table:table-cell table:style-name="ce2" office:value-type="float" office:value="3.3" calcext:value-type="float">
            <text:p>3,3</text:p>
          </table:table-cell>
          <table:table-cell table:style-name="ce4" office:value-type="float" office:value="-12" calcext:value-type="float">
            <text:p>-12</text:p>
          </table:table-cell>
          <table:table-cell table:style-name="ce3" office:value-type="string" calcext:value-type="string">
            <text:p>GND</text:p>
          </table:table-cell>
          <table:table-cell table:style-name="ce9" office:value-type="string" calcext:value-type="string">
            <text:p>ON</text:p>
          </table:table-cell>
          <table:table-cell table:number-columns-repeated="3" table:style-name="ce3" office:value-type="string" calcext:value-type="string">
            <text:p>GND</text:p>
          </table:table-cell>
          <table:table-cell table:style-name="ce14" office:value-type="string" calcext:value-type="string">
            <text:p>NC/-5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number-columns-repeated="2" table:style-name="ce2" office:value-type="float" office:value="3.3" calcext:value-type="float">
            <text:p>3,3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GND</text:p>
          </table:table-cell>
          <table:table-cell table:style-name="ce11" office:value-type="string" calcext:value-type="string">
            <text:p>OK</text:p>
          </table:table-cell>
          <table:table-cell table:style-name="ce8" office:value-type="string" calcext:value-type="string">
            <text:p>+5SB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2" office:value-type="float" office:value="3.3" calcext:value-type="float">
            <text:p>3,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X </text:p>
          </table:table-cell>
          <table:table-cell office:value-type="string" calcext:value-type="string">
            <text:p>connector cable/ cavity side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16"/>
          <table:table-cell table:style-name="ce17"/>
          <table:table-cell table:number-columns-repeated="13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NC/-5</text:p>
          </table:table-cell>
          <table:table-cell table:number-columns-repeated="3" table:style-name="ce3" office:value-type="string" calcext:value-type="string">
            <text:p>GND</text:p>
          </table:table-cell>
          <table:table-cell table:style-name="ce9" office:value-type="string" calcext:value-type="string">
            <text:p>ON</text:p>
          </table:table-cell>
          <table:table-cell table:style-name="ce3" office:value-type="string" calcext:value-type="string">
            <text:p>GND</text:p>
          </table:table-cell>
          <table:table-cell table:style-name="ce4" office:value-type="float" office:value="-12" calcext:value-type="float">
            <text:p>-12</text:p>
          </table:table-cell>
          <table:table-cell table:style-name="ce2" office:value-type="float" office:value="3.3" calcext:value-type="float">
            <text:p>3,3</text:p>
          </table:table-cell>
          <table:table-cell table:number-columns-repeated="8"/>
        </table:table-row>
        <table:table-row table:style-name="ro1">
          <table:table-cell table:style-name="ce2" office:value-type="float" office:value="3.3" calcext:value-type="float">
            <text:p>3,3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+5SB</text:p>
          </table:table-cell>
          <table:table-cell table:style-name="ce11" office:value-type="string" calcext:value-type="string">
            <text:p>OK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GND</text:p>
          </table:table-cell>
          <table:table-cell table:number-columns-repeated="2" table:style-name="ce2" office:value-type="float" office:value="3.3" calcext:value-type="float">
            <text:p>3,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(cavity side view)</text:p>
          </table:table-cell>
          <table:table-cell table:number-columns-repeated="2"/>
          <table:table-cell>
            <draw:frame draw:z-index="1" draw:name="Obraz 2" draw:style-name="gr2" draw:text-style-name="P1" svg:width="2.277cm" svg:height="5.577cm" draw:transform="rotate (-1.56817833291691) translate (0.23cm 0.445cm)">
              <draw:image xlink:href="Pictures/1000000000000052000000D2EAADFEA9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(pin side)</text:p>
          </table:table-cell>
          <table:table-cell/>
        </table:table-row>
        <table:table-row table:style-name="ro1">
          <table:table-cell office:value-type="string" calcext:value-type="string">
            <text:p>HP z440 P1</text:p>
          </table:table-cell>
          <table:table-cell table:number-columns-repeated="2"/>
          <table:table-cell office:value-type="string" calcext:value-type="string">
            <text:p>cavity side</text:p>
          </table:table-cell>
          <table:table-cell table:number-columns-repeated="12"/>
          <table:table-cell>
            <draw:frame draw:z-index="3" draw:name="Obraz 4" draw:style-name="gr2" draw:text-style-name="P1" svg:width="5.633cm" svg:height="4.408cm" svg:x="0.743cm" svg:y="0.027cm">
              <draw:image xlink:href="Pictures/10000000000000CB000000A6D375058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/>
          <table:table-cell table:number-columns-repeated="15"/>
        </table:table-row>
        <table:table-row table:style-name="ro1">
          <table:table-cell table:style-name="ce4" office:value-type="float" office:value="-12" calcext:value-type="float">
            <text:p>-12</text:p>
          </table:table-cell>
          <table:table-cell table:style-name="ce8" office:value-type="string" calcext:value-type="string">
            <text:p>+5SB</text:p>
          </table:table-cell>
          <table:table-cell table:style-name="ce11" office:value-type="string" calcext:value-type="string">
            <text:p>OK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ON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3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2"/>
          <table:table-cell>
            <draw:frame draw:z-index="2" draw:name="Obraz 3" draw:style-name="gr1" draw:text-style-name="P1" svg:width="3.722cm" svg:height="2.257cm" svg:x="0.446cm" svg:y="0.372cm">
              <draw:image xlink:href="Pictures/10000000000000860000005570A1322A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HP z440 P2</text:p>
          </table:table-cell>
          <table:table-cell table:number-columns-repeated="2"/>
          <table:table-cell office:value-type="string" calcext:value-type="string">
            <text:p>cavity sid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number-columns-repeated="4"/>
          <table:table-cell table:style-name="ce18"/>
          <table:table-cell table:number-columns-repeated="11"/>
        </table:table-row>
        <table:table-row table:style-name="ro1">
          <table:table-cell table:number-columns-repeated="6" table:style-name="ce6" office:value-type="float" office:value="12" calcext:value-type="float">
            <text:p>12</text:p>
          </table:table-cell>
          <table:table-cell table:number-columns-repeated="13"/>
          <table:table-cell>
            <draw:frame draw:z-index="4" draw:name="Obraz 5" draw:style-name="gr1" draw:text-style-name="P1" svg:width="9.639cm" svg:height="3.317cm" svg:x="2.106cm" svg:y="0.03cm">
              <draw:image xlink:href="Pictures/100000000000032C00000124A227D91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6" table:style-name="ce3" office:value-type="string" calcext:value-type="string">
            <text:p>GND</text:p>
          </table:table-cell>
          <table:table-cell table:number-columns-repeated="14"/>
        </table:table-row>
        <table:table-row table:style-name="ro1">
          <table:table-cell table:number-columns-repeated="16"/>
          <table:table-cell>
            <draw:frame draw:z-index="5" draw:name="Obraz 6" draw:style-name="gr1" draw:text-style-name="P1" svg:width="2.053cm" svg:height="2.124cm" svg:x="0.779cm" svg:y="0.426cm">
              <draw:image xlink:href="Pictures/10000000000000EB000000FEFC20D45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" draw:name="Obraz 7" draw:style-name="gr1" draw:text-style-name="P1" svg:width="2.053cm" svg:height="2.124cm" svg:x="0.649cm" svg:y="0.425cm">
              <draw:image xlink:href="Pictures/10000000000000EB000000FEFC20D453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Both HP connectors use a part of the ATX 24 pin connector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ving 2 ATX connectors, just need to cut them and repin as above.</text:p>
          </table:table-cell>
          <table:table-cell table:number-columns-repeated="19"/>
        </table:table-row>
        <table:table-row table:style-name="ro1">
          <table:table-cell table:number-columns-repeated="18"/>
          <table:table-cell>
            <draw:frame draw:z-index="9" draw:name="Obraz 10" draw:style-name="gr1" draw:text-style-name="P1" svg:width="1.273cm" svg:height="1.621cm" svg:x="1.407cm" svg:y="0.397cm">
              <draw:image xlink:href="Pictures/1000000000000058000000753D3A60D3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Obraz 8" draw:style-name="gr1" draw:text-style-name="P1" svg:width="12.93cm" svg:height="8.214cm" svg:x="2.103cm" svg:y="0.099cm">
              <draw:image xlink:href="Pictures/100000000000032900000219DBF021D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For P2, can use 2 PCIe connectors, UNDER THE CONDITION TO SWAP 12V and GND pins</text:p>
          </table:table-cell>
          <table:table-cell table:number-columns-repeated="15"/>
          <table:table-cell>
            <draw:frame draw:z-index="8" draw:name="Obraz 9" draw:style-name="gr1" draw:text-style-name="P1" svg:width="2.784cm" svg:height="1.54cm" svg:x="0.778cm" svg:y="0.028cm">
              <draw:image xlink:href="Pictures/10000000000000C700000073A58E3D3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style-name="ce7" office:value-type="string" calcext:value-type="string">
            <text:p>For P2, possible to use EPS power + 4pin power connectors. No repin required!</text:p>
          </table:table-cell>
          <table:table-cell table:style-name="ce10" table:number-columns-repeated="12"/>
          <table:table-cell table:style-name="ce1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2" style:volatile="true">
      <number:text loext:blank-width-char="-"> </number:text>
      <number:fill-character> </number:fill-character>
      <number:text loext:blank-width-char="-4">- zł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5T14:49:16.342299366</meta:creation-date>
    <dc:date>2026-07-16T11:40:53.399917418</dc:date>
    <meta:editing-duration>PT12H5M50S</meta:editing-duration>
    <meta:editing-cycles>7</meta:editing-cycles>
    <meta:generator>LibreOffice/24.2.5.2$Linux_X86_64 LibreOffice_project/bffef4ea93e59bebbeaf7f431bb02b1a39ee8a59</meta:generator>
    <meta:document-statistic meta:table-count="2" meta:cell-count="92" meta:object-count="10"/>
  </office:meta>
</office:document-meta>
</file>